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D000002639C1E0DBA.png" manifest:media-type="image/png"/>
  <manifest:file-entry manifest:full-path="Pictures/1000000100000432000001BCA92C320D.png" manifest:media-type="image/png"/>
  <manifest:file-entry manifest:full-path="Pictures/100000010000037B0000010556177732.png" manifest:media-type="image/png"/>
  <manifest:file-entry manifest:full-path="Pictures/100000010000046C000001C3910D081A.png" manifest:media-type="image/png"/>
  <manifest:file-entry manifest:full-path="Pictures/10000001000004FB0000029608553426.png" manifest:media-type="image/png"/>
  <manifest:file-entry manifest:full-path="Pictures/10000001000005260000027E0F5C811B.png" manifest:media-type="image/png"/>
  <manifest:file-entry manifest:full-path="Pictures/1000000100000050000000234C182AF8.gif" manifest:media-type="image/gif"/>
  <manifest:file-entry manifest:full-path="Pictures/100000000000007B00000022693D9A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Bold" style:font-family-generic="swiss"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horndale" svg:font-family="Thorndale"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Text_20_body">
      <style:text-properties style:font-name="Verdana" fo:font-size="8pt" fo:font-style="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4b401" style:font-weight-asian="bold" style:font-weight-complex="bold"/>
    </style:style>
    <style:style style:name="P7" style:family="paragraph" style:parent-style-name="Text_20_body">
      <style:text-properties fo:font-weight="bold" officeooo:rsid="001423de" style:font-weight-asian="bold" style:font-weight-complex="bold"/>
    </style:style>
    <style:style style:name="P8" style:family="paragraph" style:parent-style-name="Text_20_body">
      <style:paragraph-properties fo:text-align="end" style:justify-single-word="false"/>
      <style:text-properties fo:color="#808080" loext:opacity="100%" style:font-name="Arial"/>
    </style:style>
    <style:style style:name="P9" style:family="paragraph" style:parent-style-name="Text_20_body">
      <style:text-properties officeooo:rsid="001423de"/>
    </style:style>
    <style:style style:name="P10" style:family="paragraph" style:parent-style-name="Text_20_body">
      <style:text-properties officeooo:rsid="00154043"/>
    </style:style>
    <style:style style:name="P11" style:family="paragraph" style:parent-style-name="Text_20_body">
      <style:text-properties officeooo:paragraph-rsid="001cf40c"/>
    </style:style>
    <style:style style:name="P12" style:family="paragraph" style:parent-style-name="Text_20_body">
      <style:text-properties officeooo:rsid="000cbadb"/>
    </style:style>
    <style:style style:name="P13" style:family="paragraph" style:parent-style-name="Text_20_body">
      <style:text-properties officeooo:rsid="000e674a"/>
    </style:style>
    <style:style style:name="P14" style:family="paragraph" style:parent-style-name="Text_20_body">
      <style:text-properties officeooo:rsid="00238c11" officeooo:paragraph-rsid="00238c11"/>
    </style:style>
    <style:style style:name="P15" style:family="paragraph" style:parent-style-name="Text_20_body">
      <style:text-properties officeooo:rsid="00238c11" officeooo:paragraph-rsid="0025d79e"/>
    </style:style>
    <style:style style:name="P16" style:family="paragraph" style:parent-style-name="Text_20_body">
      <style:text-properties officeooo:rsid="0025d79e" officeooo:paragraph-rsid="0025d79e"/>
    </style:style>
    <style:style style:name="P17" style:family="paragraph" style:parent-style-name="Text_20_body">
      <style:text-properties officeooo:paragraph-rsid="00238c11"/>
    </style:style>
    <style:style style:name="P18" style:family="paragraph" style:parent-style-name="Text_20_body">
      <style:text-properties officeooo:rsid="002da1fa" officeooo:paragraph-rsid="002da1fa"/>
    </style:style>
    <style:style style:name="P19" style:family="paragraph" style:parent-style-name="Contents_20_1">
      <style:paragraph-properties>
        <style:tab-stops>
          <style:tab-stop style:position="17.699cm" style:type="right" style:leader-style="dotted" style:leader-text="."/>
        </style:tab-stops>
      </style:paragraph-properties>
    </style:style>
    <style:style style:name="P20" style:family="paragraph" style:parent-style-name="Contents_20_3">
      <style:paragraph-properties>
        <style:tab-stops>
          <style:tab-stop style:position="16.701cm" style:type="right" style:leader-style="dotted" style:leader-text="."/>
        </style:tab-stops>
      </style:paragraph-properties>
    </style:style>
    <style:style style:name="P21" style:family="paragraph" style:parent-style-name="Contents_20_2">
      <style:paragraph-properties>
        <style:tab-stops>
          <style:tab-stop style:position="17.2cm" style:type="right" style:leader-style="dotted" style:leader-text="."/>
        </style:tab-stops>
      </style:paragraph-properties>
    </style:style>
    <style:style style:name="P22" style:family="paragraph" style:parent-style-name="Preformatted_20_Text">
      <style:text-properties officeooo:paragraph-rsid="0025d79e"/>
    </style:style>
    <style:style style:name="P23" style:family="paragraph" style:parent-style-name="Heading_20_1" style:master-page-name="">
      <style:paragraph-properties fo:text-align="start" style:justify-single-word="false" style:page-number="auto" fo:break-before="auto" fo:break-after="auto"/>
    </style:style>
    <style:style style:name="P24" style:family="paragraph" style:parent-style-name="Preformatted_20_Text" style:list-style-name="L1"/>
    <style:style style:name="P25" style:family="paragraph" style:parent-style-name="Preformatted_20_Text">
      <style:text-properties officeooo:paragraph-rsid="002f911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paragraph-properties fo:margin-top="0cm" fo:margin-bottom="0cm" style:contextual-spacing="false"/>
    </style:style>
    <style:style style:name="P29" style:family="paragraph" style:parent-style-name="Text_20_body" style:list-style-name="L3">
      <style:text-properties officeooo:paragraph-rsid="001f103d"/>
    </style:style>
    <style:style style:name="P30" style:family="paragraph" style:parent-style-name="Text_20_body" style:list-style-name="L3">
      <style:text-properties officeooo:rsid="001d00ef" officeooo:paragraph-rsid="001d00ef"/>
    </style:style>
    <style:style style:name="P31" style:family="paragraph" style:parent-style-name="Text_20_body" style:list-style-name="L4"/>
    <style:style style:name="P3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cf40c"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76734"/>
    </style:style>
    <style:style style:name="T5" style:family="text">
      <style:text-properties officeooo:rsid="000870b7"/>
    </style:style>
    <style:style style:name="T6" style:family="text">
      <style:text-properties officeooo:rsid="0009fecb"/>
    </style:style>
    <style:style style:name="T7" style:family="text">
      <style:text-properties officeooo:rsid="00154043"/>
    </style:style>
    <style:style style:name="T8" style:family="text">
      <style:text-properties officeooo:rsid="001edf91"/>
    </style:style>
    <style:style style:name="T9" style:family="text">
      <style:text-properties officeooo:rsid="001f103d"/>
    </style:style>
    <style:style style:name="T10" style:family="text">
      <style:text-properties officeooo:rsid="0025d79e"/>
    </style:style>
    <style:style style:name="T11" style:family="text">
      <style:text-properties officeooo:rsid="002991d7"/>
    </style:style>
    <style:style style:name="T12" style:family="text">
      <style:text-properties officeooo:rsid="002cf4f5"/>
    </style:style>
    <style:style style:name="T13" style:family="text">
      <style:text-properties officeooo:rsid="002df70e"/>
    </style:style>
    <style:style style:name="T14" style:family="text">
      <style:text-properties fo:color="#000000" loext:opacity="100%" style:font-name="Tahoma1" fo:font-size="9pt" officeooo:rsid="002df70e"/>
    </style:style>
    <style:style style:name="T15" style:family="text">
      <style:text-properties officeooo:rsid="002f91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P23" text:outline-level="1"><text:bookmark-start text:name="__RefHeading__505_1417426863"/><text:title>EXT: PayPal Transactions</text:title><text:bookmark-end text:name="__RefHeading__505_1417426863"/></text:h>
      <text:p text:style-name="P3">Extension Key: <text:subject>transactor_paypal</text:subject></text:p>
      <text:p text:style-name="P3">Language: <text:user-defined style:data-style-name="N0" text:name="language (en, de, fr, nl, dk, es, ... )">en</text:user-defined></text:p>
      <text:p text:style-name="P3">Keywords: <text:keywords>forAdmins, forBeginners</text:keywords></text:p>
      <text:p text:style-name="P3">Copyright 20<text:span text:style-name="T13">2</text:span>1,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a xlink:type="simple" xlink:href="#__RefHeading__505_1417426863" text:style-name="Internet_20_link" text:visited-style-name="Internet_20_link">EXT: PayPal Transactions<text:tab/>1</text:a></text:p>
          <text:p text:style-name="P21"><text:a xlink:type="simple" xlink:href="#__RefHeading__507_1417426863" text:style-name="Internet_20_link" text:visited-style-name="Internet_20_link">Introduction<text:tab/>3</text:a></text:p>
          <text:p text:style-name="P21"><text:a xlink:type="simple" xlink:href="#__RefHeading__509_1417426863" text:style-name="Internet_20_link" text:visited-style-name="Internet_20_link">Users manual<text:tab/>4</text:a></text:p>
          <text:p text:style-name="P20"><text:a xlink:type="simple" xlink:href="#__RefHeading__511_1417426863" text:style-name="Internet_20_link" text:visited-style-name="Internet_20_link">FAQ<text:tab/>4</text:a></text:p>
          <text:p text:style-name="P20"><text:a xlink:type="simple" xlink:href="#__RefHeading__513_1417426863" text:style-name="Internet_20_link" text:visited-style-name="Internet_20_link">Use PDT<text:tab/>4</text:a></text:p>
          <text:p text:style-name="P21"><text:a xlink:type="simple" xlink:href="#__RefHeading__515_1417426863" text:style-name="Internet_20_link" text:visited-style-name="Internet_20_link">Administration<text:tab/>9</text:a></text:p>
          <text:p text:style-name="P20"><text:a xlink:type="simple" xlink:href="#__RefHeading__517_1417426863" text:style-name="Internet_20_link" text:visited-style-name="Internet_20_link">FAQ<text:tab/>9</text:a></text:p>
          <text:p text:style-name="P21"><text:a xlink:type="simple" xlink:href="#__RefHeading__519_1417426863" text:style-name="Internet_20_link" text:visited-style-name="Internet_20_link">Configuration<text:tab/>10</text:a></text:p>
          <text:p text:style-name="P20"><text:a xlink:type="simple" xlink:href="#__RefHeading___Toc1564_2897396867" text:style-name="Internet_20_link" text:visited-style-name="Internet_20_link">Extension Manager<text:tab/>10</text:a></text:p>
          <text:p text:style-name="P21"><text:a xlink:type="simple" xlink:href="#__RefHeading__521_1417426863" text:style-name="Internet_20_link" text:visited-style-name="Internet_20_link">Tutorial<text:tab/>12</text:a></text:p>
          <text:p text:style-name="P20"><text:a xlink:type="simple" xlink:href="#__RefHeading__523_1417426863" text:style-name="Internet_20_link" text:visited-style-name="Internet_20_link">Test accounts<text:tab/>12</text:a></text:p>
          <text:p text:style-name="P21"><text:a xlink:type="simple" xlink:href="#__RefHeading__525_1417426863" text:style-name="Internet_20_link" text:visited-style-name="Internet_20_link">Known problems<text:tab/>13</text:a></text:p>
          <text:p text:style-name="P21"><text:a xlink:type="simple" xlink:href="#__RefHeading__527_1417426863" text:style-name="Internet_20_link" text:visited-style-name="Internet_20_link">To-Do list<text:tab/>14</text:a></text:p>
          <text:p text:style-name="P21"><text:a xlink:type="simple" xlink:href="#__RefHeading__529_1417426863" text:style-name="Internet_20_link" text:visited-style-name="Internet_20_link">Changelog<text:tab/>15</text:a></text:p>
        </text:index-body>
      </text:table-of-content>
      <text:p text:style-name="Text_20_body"/>
      <text:p text:style-name="Text_20_body"/>
      <text:p text:style-name="Text_20_body"/>
      <text:h text:style-name="Heading_20_2" text:outline-level="2"><draw:frame draw:style-name="fr2" draw:name="Grafik4" text:anchor-type="paragraph" svg:x="15.323cm" svg:y="0.441cm" svg:width="2.117cm" svg:height="0.926cm" draw:z-index="30"><draw:image xlink:href="Pictures/1000000100000050000000234C182AF8.gif" xlink:type="simple" xlink:show="embed" xlink:actuate="onLoad" draw:mime-type="image/gif"/></draw:frame><text:bookmark-start text:name="__RefHeading__507_1417426863"/>Introduction<text:bookmark-end text:name="__RefHeading__507_1417426863"/></text:h>
      <text:p text:style-name="Text_20_body"/>
      <text:p text:style-name="Text_20_body">PayPal enables any business or consumer with an email address to securely, conveniently, and cost-effectively send and receive payments online. Their network builds on the financial infrastructure of bank accounts and credit cards to create a global payment solution. They deliver a product ideally suited for small businesses, online merchants, individuals, and others currently underserved by traditional payment mechanisms.</text:p>
      <text:p text:style-name="Text_20_body">They seek to become the global standard for online payments, offering our service to users in 103 countries and regions. They have over 100 million registered accounts, including more than 5 million Business accounts. They're growing by thousands of accounts per day, with virtually no traditional sales or marketing.</text:p>
      <text:p text:style-name="Text_20_body">The size of our network and widening acceptance of their product has helped them become the leading payment network for online auction websites, including eBay. PayPal is also increasingly being used at other e-commerce sites for the sale of goods such as electronics and household items, services such as web design and travel, and digital content. Offline businesses, including lawyers, contractors and physicians, are increasingly using PayPal to receive payments online.</text:p>
      <text:p text:style-name="Text_20_body">Founded by Peter Thiel and Max Levchin, PayPal is headquartered in San Jose, California. PayPal is the 2002 SIIA Codie Awards winner for Best eCommerce Solution and is recognized by PC Magazine as one of the top 100 web sites. </text:p>
      <text:h text:style-name="Heading_20_2" text:outline-level="2"><text:bookmark-start text:name="__RefHeading__509_1417426863"/>Users manual<text:bookmark-end text:name="__RefHeading__509_1417426863"/></text:h>
      <text:p text:style-name="Text_20_body">Use this extension together with the extension Payment Transactor and an application TYPO3 extension which needs its payment methods. The book <text:a xlink:type="simple" xlink:href="https://www.opensourcepress.de/" text:style-name="Internet_20_link" text:visited-style-name="Visited_20_Internet_20_Link">'Der TYPO3 Webshop'</text:a> shows you how to use this extension with tt_products.</text:p>
      <text:h text:style-name="Heading_20_3" text:outline-level="3"><text:bookmark-start text:name="__RefHeading__511_1417426863"/>FAQ<text:bookmark-end text:name="__RefHeading__511_1417426863"/></text:h>
      <text:list text:style-name="L1">
        <text:list-item>
          <text:p text:style-name="P26">Which payment methods are possible with this TYPO3 extension?<text:line-break/><text:line-break/><text:a xlink:type="simple" xlink:href="https://cms.paypal.com/us/cgi-bin/?&amp;cmd=_render-content&amp;content_ID=developer/howto_html_wp_standard_overview" text:style-name="Internet_20_link" text:visited-style-name="Visited_20_Internet_20_Link">Website Payments Standard</text:a> using HTML forms</text:p>
        </text:list-item>
        <text:list-item>
          <text:p text:style-name="P26">What is the problem with Realurl? The PayPal gateway will send you the PDT verification in the parameter 'tx'.<text:line-break/>You should deactivate Realurl on the Finalize page:</text:p>
          <text:p text:style-name="P24">config.tx_realurl_enable = 0</text:p>
          <text:p text:style-name="P26"><text:line-break/>Or try to enter this configuration and add all parameters which will come from PayPal:</text:p>
          <text:p text:style-name="P24">$GLOBALS['TYPO3_CONF_VARS']['EXTCONF']['realurl'] = array (</text:p>
          <text:p text:style-name="P24"><text:s text:c="2"/>'_DEFAULT' =&gt;</text:p>
          <text:p text:style-name="P24"><text:s text:c="2"/>array (</text:p>
          <text:p text:style-name="P24"><text:s text:c="5"/>'preVars' =&gt; array(</text:p>
          <text:p text:style-name="P24"><text:s text:c="7"/>array(</text:p>
          <text:p text:style-name="P24"><text:s text:c="9"/>'GETvar' =&gt; 'tx',</text:p>
          <text:p text:style-name="P24"><text:tab/> <text:s text:c="2"/>'noMatch' =&gt; 'bypass',</text:p>
          <text:p text:style-name="P24"><text:s text:c="7"/>),</text:p>
          <text:p text:style-name="P24"><text:s text:c="5"/>),</text:p>
          <text:p text:style-name="P24"><text:s text:c="2"/>)</text:p>
          <text:p text:style-name="P24">);</text:p>
          <text:p text:style-name="P24"/>
        </text:list-item>
      </text:list>
      <text:h text:style-name="Heading_20_3" text:outline-level="3"><text:bookmark-start text:name="__RefHeading__513_1417426863"/>Use PDT<text:bookmark-end text:name="__RefHeading__513_1417426863"/></text:h>
      <text:p text:style-name="Text_20_body">Which method is used to verify if the payment at the PayPal site has been done successfully?</text:p>
      <text:p text:style-name="Text_20_body">It uses <text:a xlink:type="simple" xlink:href="https://cms.paypal.com/us/cgi-bin/?cmd=_render-content&amp;content_ID=developer/howto_html_paymentdatatransfer" text:style-name="Internet_20_link" text:visited-style-name="Visited_20_Internet_20_Link">Payment Data Transfer (PDT)</text:a> to retrieve the details about the transaction. See the description before how to acquire a PDT identity token in your PayPal profile. Enter the URL of the payment page of the shop.</text:p>
      <text:p text:style-name="Text_20_body"/>
      <text:p text:style-name="P18">See how to <text:a xlink:type="simple" xlink:href="https://stackoverflow.com/questions/31961828/where-are-my-selling-tools-website-preferences-and-instant-payment-notifi/66987175#66987175https://stackoverflow.com/questions/31961828/where-are-my-selling-tools-website-preferences-and-instant-payment-notifi/66987175%2366987175https://stackoverflow.com/questions/31961828/where-are-my-selling-tools-website-preferences-and-instant-payment-notifi/66987175%2366987175" text:style-name="Internet_20_link" text:visited-style-name="Visited_20_Internet_20_Link">activate PDT on PayPal</text:a></text:p>
      <text:p text:style-name="Text_20_body"/>
      <text:p text:style-name="P8">copyright PayPal (Europe) S.à r.l. &amp; Cie, S.C.A</text:p>
      <text:p text:style-name="Heading_20_4"><text:line-break/>German: </text:p>
      <text:p text:style-name="Text_20_body"/>
      <text:p text:style-name="Text_20_body"><draw:frame draw:style-name="fr3" draw:name="Grafik5" text:anchor-type="paragraph" svg:width="17.699cm" svg:height="8.567cm" draw:z-index="31"><draw:image xlink:href="Pictures/10000001000005260000027E0F5C811B.png" xlink:type="simple" xlink:show="embed" xlink:actuate="onLoad" draw:mime-type="image/png"/></draw:frame></text:p>
      <text:p text:style-name="Text_20_body"><text:soft-page-break/></text:p>
      <text:p text:style-name="P5">“Mein Profil – <text:span text:style-name="T4">Verkäufer/Händler”</text:span></text:p>
      <text:p text:style-name="P9">Nur unter diesem Punkt müssen gewisse Einstellungen gemacht werden, falls diese Funktionen genutzt werden sollen.</text:p>
      <text:p text:style-name="Text_20_body"/>
      <text:p text:style-name="Text_20_body"><draw:frame draw:style-name="fr3" draw:name="Grafik6" text:anchor-type="paragraph" svg:width="17.699cm" svg:height="9.188cm" draw:z-index="32"><draw:image xlink:href="Pictures/10000001000004FB0000029608553426.png" xlink:type="simple" xlink:show="embed" xlink:actuate="onLoad" draw:mime-type="image/png"/></draw:frame><text:s/></text:p>
      <text:p text:style-name="P12">“Website-Einstellungen” Aktualisieren</text:p>
      <text:p text:style-name="Text_20_body"/>
      <text:p text:style-name="Text_20_body"><draw:frame draw:style-name="fr3" draw:name="Grafik1" text:anchor-type="paragraph" svg:width="17.699cm" svg:height="5.184cm" draw:z-index="33"><draw:image xlink:href="Pictures/100000010000037B0000010556177732.png" xlink:type="simple" xlink:show="embed" xlink:actuate="onLoad" draw:mime-type="image/png"/></draw:frame></text:p>
      <text:p text:style-name="Text_20_body"><text:soft-page-break/>“Übertragung der Zahlungsdaten” Checkbox “Aktiviert” anklicken. </text:p>
      <text:p text:style-name="P13">Hier finden Sie anschließend den Identitäts-Token, den Sie im Extension Manager eintragen müssen. Den Identitäts-Token von hier herauskopieren und unter PDT im Extension Manager zu dieser Extension eintragen und speichern.</text:p>
      <text:p text:style-name="Text_20_body"/>
      <text:p text:style-name="Text_20_body"/>
      <text:p text:style-name="Text_20_body"/>
      <text:p text:style-name="Text_20_body"><draw:frame draw:style-name="fr2" draw:name="Grafik8" text:anchor-type="paragraph" svg:x="0.106cm" svg:y="0.545cm" svg:width="17.699cm" svg:height="7.05cm" draw:z-index="35"><draw:image xlink:href="Pictures/100000010000046C000001C3910D081A.png" xlink:type="simple" xlink:show="embed" xlink:actuate="onLoad" draw:mime-type="image/png"/></draw:frame></text:p>
      <text:p text:style-name="Text_20_body"/>
      <text:p text:style-name="Text_20_body">Anzeige: </text:p>
      <text:p text:style-name="Text_20_body"/>
      <text:p text:style-name="P6">Benachrichtigungen über Sofortzahlungen</text:p>
      <text:p text:style-name="P10">Hier muss die Benachrichtigungs-URL in diesem Format eingegeben werden:</text:p>
      <text:p text:style-name="Text_20_body"><text:a xlink:type="simple" xlink:href="http://meine-shop-domaene.de/index.php?id=40&amp;transactor=paypal" text:style-name="Internet_20_link" text:visited-style-name="Visited_20_Internet_20_Link"><text:span text:style-name="T13">http://meine-shop-domaene.de/index.php?id=40&amp;transactor=paypal</text:span></text:a><text:span text:style-name="T7"><text:line-break/><text:line-break/>Dieses sollte die Finalize Seite des Shops sein. Es wird außerdem der </text:span><text:span text:style-name="T14">transactor</text:span><text:span text:style-name="T7"> Parameter </text:span><text:span text:style-name="T13">(für die TYPO3 10 Middleware)</text:span><text:span text:style-name="T7"> mit dem Wert paypal übergeben. Das ist unbedingt notwendig, damit diese Extension danach wieder ausgeführt wird und auch den Shop aufweckt und ihn die Bestellbestätigung versenden lässt, falls dies nicht vorher schon geschehen ist, als der Kunde nach der Bezahlung in den Shop zurückgekehrt ist.</text:span></text:p>
      <text:p text:style-name="P10"/>
      <text:p text:style-name="Text_20_body">Sie haben die Funktion "Sofortige Zahlungsbestätigung (IPN)" aktiviert. Sie können Ihre sofortigen Zahlungsbestätigungen auf der Verlaufsseite für sofortige Zahlungsbestätigungen (IPN) anzeigen. Falls erforderlich, können Sie über diese Seite sofortige Zahlungsbestätigungen auch erneut senden. Weitere Informationen zu Verwendung und Fehlerbehebung dieser Funktion finden Sie unter Sofortige Zahlungsbestätigung.</text:p>
      <text:p text:style-name="Heading_20_4"><text:soft-page-break/></text:p>
      <text:p text:style-name="P7">Automatische Rückleitung in den Shop:</text:p>
      <text:p text:style-name="P10"><draw:frame draw:style-name="fr2" draw:name="Grafik3" text:anchor-type="paragraph" svg:x="-0.123cm" svg:y="0.293cm" svg:width="17.699cm" svg:height="7.317cm" draw:z-index="34"><draw:image xlink:href="Pictures/1000000100000432000001BCA92C320D.png" xlink:type="simple" xlink:show="embed" xlink:actuate="onLoad" draw:mime-type="image/png"/></draw:frame></text:p>
      <text:p text:style-name="P10"/>
      <text:p text:style-name="P10">Das ist optional, aber empfehlenswert. Der Kunde wird 10 Sekunden nach der Bezahlung einfach automatisch in den Shop zurückgeleitet. Das sollte jeder dann verstehen können.</text:p>
      <text:p text:style-name="P11"><text:span text:style-name="T2">PayPal-</text:span><text:span text:style-name="Strong_20_Emphasis">Anforderungen an die Rückleitungs-URL:</text:span> Für die Einrichtung der Funktion Automatische Rückleitung müssen folgende Anforderungen erfüllt werden:</text:p>
      <text:list text:style-name="L2">
        <text:list-item>
          <text:p text:style-name="P28">Den Nutzungsbedingungen zufolge müssen Sie auf der Seite, die durch die Rückleitungs-URL angezeigt wird, einen Hinweis angeben, der den Käufer wissen lässt, dass die Zahlung erfolgt ist und die Transaktion abgeschlossen wurde.</text:p>
        </text:list-item>
        <text:list-item>
          <text:p text:style-name="P28">Sie müssen auf der Seite, die durch die Rückleitungs-URL angezeigt wird, einen Hinweis angeben, der den Käufer wissen lässt, dass ihm die Transaktionsdetails per E-Mail zugesendet werden. </text:p>
        </text:list-item>
        <text:list-item>
          <text:p text:style-name="P27">Beispiel: Danke für Ihre Zahlung. Ihre Transaktion wurde abgeschlossen und Sie erhalten per E-Mail eine Bestätigung für Ihren Kauf. Sie können sich unter www.paypal.de in Ihr Konto einloggen, um die Transaktionsdetails anzuzeigen.</text:p>
        </text:list-item>
      </text:list>
      <text:p text:style-name="Heading_20_4"/>
      <text:p text:style-name="Heading_20_4">Français: </text:p>
      <text:p text:style-name="Text_20_body"><text:line-break/><text:span text:style-name="T1">Préférences</text:span></text:p>
      <text:p text:style-name="Text_20_body">Plus d'options</text:p>
      <text:p text:style-name="P5">Notification instantanée de paiement (IPN)</text:p>
      <text:p text:style-name="Text_20_body">Modifier les paramètres des notifications instantanées de paiement (IPN)<text:line-break/>URL de notification<text:line-break/>Recevoir les messages IPN (activé)<text:line-break/>Enregistrer</text:p>
      <text:p text:style-name="Text_20_body"/>
      <text:p text:style-name="P5">Préférences de réception de paiements sur le site</text:p>
      <text:p text:style-name="Text_20_body">Renvoi automatique pour les paiements sur site marchand<text:line-break/>Actif<text:line-break/>URL de renvoi : …<text:line-break/>Transfert des données de paiement (facultatif)<text:line-break/>Actif</text:p>
      <text:p text:style-name="P5">Et voilà:</text:p>
      <text:p text:style-name="Text_20_body">Jeton d'identité : xxx<text:line-break/><text:line-break/>Récapitulatif des Préférences</text:p>
      <text:section text:style-name="Sect3" text:name="messageBox">
        <text:p text:style-name="Text_20_body"><text:soft-page-break/>Vous venez d'enregistrer vos préférences. Veuillez utiliser le jeton d'identité suivant lorsque vous configurez le transfert des données de paiement sur votre site. S.........................-RS</text:p>
      </text:section>
      <text:p text:style-name="Text_20_body"/>
      <text:h text:style-name="Heading_20_2" text:outline-level="2"><text:bookmark-start text:name="__RefHeading__515_1417426863"/>Administration<text:bookmark-end text:name="__RefHeading__515_1417426863"/></text:h>
      <text:p text:style-name="Text_20_body"/>
      <text:p text:style-name="Text_20_body">This extension requires “static_info_tables” with version 2.0.5 or higher for the transfer of addresses. The extension “transactor” must have been installed before you install “transactor_paypal”.</text:p>
      <text:h text:style-name="Heading_20_3" text:outline-level="3"><text:bookmark-start text:name="__RefHeading__517_1417426863"/>FAQ<text:bookmark-end text:name="__RefHeading__517_1417426863"/></text:h>
      <text:list text:style-name="L3">
        <text:list-item>
          <text:p text:style-name="P29">How do I test the PayPal Gateway? I do not want to use my real account.<text:line-break/>Visit <text:a xlink:type="simple" xlink:href="https://developer.paypal.com/" text:style-name="Internet_20_link" text:visited-style-name="Visited_20_Internet_20_Link"><text:span text:style-name="T9">https://developer.paypal.com</text:span></text:a> and create your personal test accounts for the PayPal sandbox there. See the Sandbox User Guide.</text:p>
        </text:list-item>
        <text:list-item>
          <text:p text:style-name="P30">I want to debug the IPN messages <text:span text:style-name="T8">from the Sandbox</text:span>. Which IP must I track down?<text:line-break/>173.0.82.126<text:line-break/></text:p>
        </text:list-item>
      </text:list>
      <text:p text:style-name="Text_20_body"/>
      <text:h text:style-name="Heading_20_2" text:outline-level="2"><text:bookmark-start text:name="__RefHeading__519_1417426863"/>Configuration<text:bookmark-end text:name="__RefHeading__519_1417426863"/></text:h>
      <text:p text:style-name="Text_20_body">tt_products example setup</text:p>
      <text:p text:style-name="Text_20_body"><text:span text:style-name="T1">Example</text:span>:</text:p>
      <text:p text:style-name="Text_20_body"/>
      <text:p text:style-name="P25">lib.transactor_paypal <text:span text:style-name="T15">= transactor</text:span></text:p>
      <text:p text:style-name="P25">lib.transactor_paypal {</text:p>
      <text:p text:style-name="Preformatted_20_Text"><text:s text:c="3"/>extName = transactor_paypal</text:p>
      <text:p text:style-name="Preformatted_20_Text"><text:s text:c="3"/>extWww = <text:a xlink:type="simple" xlink:href="http://www.paypal.com/" text:style-name="Internet_20_link" text:visited-style-name="Visited_20_Internet_20_Link">www.paypal.com</text:a></text:p>
      <text:p text:style-name="Preformatted_20_Text"><text:s text:c="3"/>extTitle = PayPal Website Payments Standard</text:p>
      <text:p text:style-name="Preformatted_20_Text"><text:s text:c="3"/>extInfo = PayPal enables any business or consumer with an email address to securely, conveniently, and cost-effectively send and receive payments online.</text:p>
      <text:p text:style-name="Preformatted_20_Text"><text:s text:c="3"/>extImage = <text:span text:style-name="T6">EXT:transactor_paypal/Resources/Public/Images/paypal_euro.gif</text:span></text:p>
      <text:p text:style-name="Preformatted_20_Text"><text:s text:c="3"/>gatewaymode = for<text:span text:style-name="T6">m</text:span></text:p>
      <text:p text:style-name="Preformatted_20_Text"><text:s text:c="3"/>paymentMethod = <text:span text:style-name="T6">webpayment_standard</text:span></text:p>
      <text:p text:style-name="Preformatted_20_Text"><text:s text:c="3"/>currency = EUR</text:p>
      <text:p text:style-name="Preformatted_20_Text"><text:s text:c="3"/>templateFile = <text:span text:style-name="T6">EXT:transactor/Resources/Private/Templates/PaymentHtmlTemplate.html</text:span></text:p>
      <text:p text:style-name="Preformatted_20_Text"><text:s text:c="3"/><text:span text:style-name="T6">returnPID = 15 </text:span></text:p>
      <text:p text:style-name="Preformatted_20_Text"><text:s text:c="3"/>cancelPID = 12 </text:p>
      <text:p text:style-name="Preformatted_20_Text"/>
      <text:p text:style-name="Preformatted_20_Text"><text:s text:c="3"/>### Remove the following conf lines! Do not copy this part.</text:p>
      <text:p text:style-name="Preformatted_20_Text"><text:s text:c="3"/>conf {</text:p>
      <text:p text:style-name="Preformatted_20_Text"><text:s text:c="6"/>merchant = KURT</text:p>
      <text:p text:style-name="Preformatted_20_Text"><text:s text:c="6"/>key1 = 123</text:p>
      <text:p text:style-name="Preformatted_20_Text"><text:s text:c="6"/>key2 = 987</text:p>
      <text:p text:style-name="Preformatted_20_Text"><text:s text:c="6"/>color = blue</text:p>
      <text:p text:style-name="Preformatted_20_Text"><text:s text:c="6"/>decorator = default</text:p>
      <text:p text:style-name="Preformatted_20_Text"><text:s text:c="3"/>}</text:p>
      <text:p text:style-name="Preformatted_20_Text"><text:s text:c="3"/><text:span text:style-name="T11">### overwrite the Extension Manager configuration . optional</text:span></text:p>
      <text:p text:style-name="Preformatted_20_Text"><text:s text:c="3"/><text:span text:style-name="T11">em {</text:span></text:p>
      <text:p text:style-name="Preformatted_20_Text"><text:s text:c="6"/>pdtAmountDifference <text:span text:style-name="T11">= 2</text:span></text:p>
      <text:p text:style-name="Preformatted_20_Text"><text:s text:c="3"/><text:span text:style-name="T11">}</text:span></text:p>
      <text:p text:style-name="Preformatted_20_Text">}</text:p>
      <text:p text:style-name="Text_20_body"/>
      <text:p text:style-name="Preformatted_20_Text"/>
      <text:p text:style-name="Preformatted_20_Text">plugin.tt_products {</text:p>
      <text:p text:style-name="Preformatted_20_Text"><text:s text:c="4"/>payment {</text:p>
      <text:p text:style-name="Preformatted_20_Text"><text:s text:c="8"/>radio = 1</text:p>
      <text:p text:style-name="Preformatted_20_Text"><text:s text:c="8"/>TAXpercentage = 19</text:p>
      <text:p text:style-name="Preformatted_20_Text"><text:s text:c="8"/>10.title = Vorkasse</text:p>
      <text:p text:style-name="Preformatted_20_Text"><text:s text:c="8"/>20.title = Kreditkarte</text:p>
      <text:p text:style-name="Preformatted_20_Text"><text:s text:c="8"/>20.percentOfTotalShipping = 0.04</text:p>
      <text:p text:style-name="Preformatted_20_Text"><text:s text:c="8"/>30.title = Nachnahme</text:p>
      <text:p text:style-name="Preformatted_20_Text"><text:s text:c="8"/>30.discountDeactive = 1</text:p>
      <text:p text:style-name="Preformatted_20_Text"><text:s text:c="8"/>30.price.type = count</text:p>
      <text:p text:style-name="Preformatted_20_Text"><text:s text:c="8"/>30.price.1 = 4</text:p>
      <text:p text:style-name="Preformatted_20_Text"><text:s text:c="8"/>30.price.6 = 5.8</text:p>
      <text:p text:style-name="Preformatted_20_Text"><text:s text:c="8"/>30.price.noCostsAmount = 20</text:p>
      <text:p text:style-name="Preformatted_20_Text"><text:s text:c="8"/>30.showLimit = 99</text:p>
      <text:p text:style-name="Preformatted_20_Text"><text:s text:c="8"/>90.title = PayPal Gateway</text:p>
      <text:p text:style-name="Preformatted_20_Text"><text:s text:c="8"/>90.handleLib &lt; lib.transactor_paypal</text:p>
      <text:p text:style-name="Preformatted_20_Text"><text:s text:c="8"/>90.image.file = EXT:transactor_paypal/Resources/Public/Images/paypal_euro.gif</text:p>
      <text:p text:style-name="Preformatted_20_Text"><text:s text:c="8"/>90.mode = Paypal</text:p>
      <text:p text:style-name="Preformatted_20_Text"><text:s text:c="4"/>}</text:p>
      <text:p text:style-name="Preformatted_20_Text">}</text:p>
      <text:p text:style-name="Text_20_body"/>
      <text:p text:style-name="Text_20_body"/>
      <text:p text:style-name="Text_20_body">Payment fees for tt_products 2.12.0. Automatische Ermittlung der Bezahlkosten.</text:p>
      <text:p text:style-name="Preformatted_20_Text">lib.transactor_paypal {</text:p>
      <text:p text:style-name="Preformatted_20_Text"><text:s text:c="3"/><text:span text:style-name="T5">costs</text:span> = <text:span text:style-name="T5">auto</text:span></text:p>
      <text:p text:style-name="Preformatted_20_Text">}</text:p>
      <text:p text:style-name="Text_20_body"/>
      <text:h text:style-name="Heading_20_3" text:outline-level="3"><text:bookmark-start text:name="__RefHeading___Toc1564_2897396867"/>Extension Manager<text:bookmark-end text:name="__RefHeading___Toc1564_2897396867"/></text:h>
      <text:p text:style-name="P14">You must add your PayPal account in the Extension Manager for transactor_paypal and click on the checkbox “Production” if it is the real PayPal account and not the Sandbox account.</text:p>
      <text:p text:style-name="P14"/>
      <text:p text:style-name="P14"/>
      <text:p text:style-name="P14"><text:soft-page-break/></text:p>
      <text:p text:style-name="P16">The Extension Manager settings can be overwritten by setup:</text:p>
      <text:p text:style-name="P22">lib.transactor_paypal {</text:p>
      <text:p text:style-name="P22"><text:s text:c="3"/>  em {<text:line-break/>    business = franz@<text:span text:style-name="T10">business</text:span>.de<text:line-break/>    ## Identitäts-Token: <text:line-break/>    pdtToken = <text:span text:style-name="T10">dlsoe003kcjdopq030eölJiS</text:span>-<text:span text:style-name="T10">30822_dick39ßßßß299slllllllllldcöwe</text:span><text:line-break/>  }</text:p>
      <text:p text:style-name="P22">}</text:p>
      <text:p text:style-name="P15"/>
      <text:p text:style-name="P17"><draw:frame draw:style-name="fr1" draw:name="Image1" text:anchor-type="paragraph" svg:width="17.699cm" svg:height="10.116cm" draw:z-index="36"><draw:image xlink:href="Pictures/100000010000042D000002639C1E0DBA.png" xlink:type="simple" xlink:show="embed" xlink:actuate="onLoad" draw:mime-type="image/png"/></draw:frame></text:p>
      <text:h text:style-name="Heading_20_2" text:outline-level="2"><text:bookmark-start text:name="__RefHeading__521_1417426863"/>Tutorial<text:bookmark-end text:name="__RefHeading__521_1417426863"/></text:h>
      <text:p text:style-name="Text_20_body"/>
      <text:h text:style-name="Heading_20_3" text:outline-level="3"><text:bookmark-start text:name="__RefHeading__523_1417426863"/>Test accounts<text:bookmark-end text:name="__RefHeading__523_1417426863"/></text:h>
      <text:p text:style-name="Text_20_body">Make your entries in the Extension Manager for the Paypal Suite extension. Get a test account at <text:a xlink:type="simple" xlink:href="https://developer.paypal.com/" text:style-name="Internet_20_link" text:visited-style-name="Visited_20_Internet_20_Link">https://developer.paypal.com/</text:a> or <text:s/><text:a xlink:type="simple" xlink:href="https://www.x.com/" text:style-name="Internet_20_link" text:visited-style-name="Visited_20_Internet_20_Link">https://www.x.com</text:a> and enter <text:a xlink:type="simple" xlink:href="https://www.sandbox.paypal.com/cgi-bin/webscr" text:style-name="Internet_20_link" text:visited-style-name="Visited_20_Internet_20_Link">https://www.sandbox.paypal.com/cgi-bin/webscr</text:a> as Paypal url for testing purposes. Then you must create some Paypal user test accounts and use them to do the payments.</text:p>
      <text:h text:style-name="Heading_20_2" text:outline-level="2"><text:bookmark-start text:name="__RefHeading__525_1417426863"/>Known problems<text:bookmark-end text:name="__RefHeading__525_1417426863"/></text:h>
      <text:list text:style-name="L4">
        <text:list-item>
          <text:p text:style-name="P31">Get in contact with the Paypal support. Report any troubles and the solutions to the author of this extension.</text:p>
        </text:list-item>
        <text:list-item>
          <text:p text:style-name="P31">After the payment the buyer does not automatically return to the shop to finish the payment. <text:s/>To use PDT, you must <text:a xlink:type="simple" xlink:href="https://cms.paypal.com/us/cgi-bin/?cmd=_render-content&amp;content_ID=developer/howto_html_paymentdatatransfer" text:style-name="Internet_20_link" text:visited-style-name="Visited_20_Internet_20_Link">activate PDT</text:a> and Auto Return in your PayPal account profile and enter your PDT identity token in the Extension Manager display of this extension.</text:p>
        </text:list-item>
      </text:list>
      <text:h text:style-name="Heading_20_2" text:outline-level="2"><text:bookmark-start text:name="__RefHeading__527_1417426863"/>To-Do list<text:bookmark-end text:name="__RefHeading__527_1417426863"/></text:h>
      <text:p text:style-name="Text_20_body">- Integrate all new possibilities of PayPal.</text:p>
      <text:h text:style-name="Heading_20_2" text:outline-level="2"><text:bookmark-start text:name="__RefHeading__529_1417426863"/>Changelog<text:bookmark-end text:name="__RefHeading__529_1417426863"/></text:h>
      <text:p text:style-name="Text_20_body">- 21.6.2010 First version used by tt_products 2.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Bold" style:font-family-generic="swiss"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horndale" svg:font-family="Thorndale"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1"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Tahoma1"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style:contextual-spacing="false" fo:text-align="start" style:justify-single-word="false" style:page-number="auto" fo:break-before="page" fo:background-color="transparent" style:vertical-align="auto">
        <style:tab-stops/>
        <style:drop-cap/>
      </style:paragraph-properties>
      <style:text-properties fo:color="#69a550" loext:opacity="100%" style:font-name="Tahoma"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loext:opacity="100%" style:font-name="Tahoma1"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loext:opacity="100%" style:font-name="Tahoma"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loext:opacity="100%" style:font-name="Tahoma1"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loext:opacity="100%" style:font-name="Arial1"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1"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1"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loext:opacity="100%" style:font-name="Tahoma1"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Tahoma1"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loext:opacity="100%" style:font-name="Tahoma"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loext:opacity="100%" style:font-name="Tahoma1"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loext:opacity="100%"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loext:opacity="100%"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Labels" style:family="graphic">
      <style:graphic-properties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line text:anchor-type="paragraph" draw:z-index="14" draw:name="Shape1" draw:style-name="Mgr1" draw:text-style-name="MP2" svg:x1="-0.003cm" svg:y1="0.778cm" svg:x2="17.684cm" svg:y2="0.778cm"><text:p/></draw:line><text:span text:style-name="MT1"><draw:frame draw:style-name="Mfr1" draw:name="Grafik2" text:anchor-type="as-char" svg:y="-0.529cm" svg:width="2.29cm" svg:height="0.55cm" draw:z-index="29"><draw:image xlink:href="Pictures/100000000000007B00000022693D9AF4.png" xlink:type="simple" xlink:show="embed" xlink:actuate="onLoad" draw:mime-type="image/png"/></draw:frame></text:span><text:span text:style-name="MT1"><text:s/></text:span><text:span text:style-name="MT1"><text:title>EXT: PayPal Transactions</text:title></text:span><text:span text:style-name="MT1"><text:s/>- </text:span><text:span text:style-name="MT1"><text:subject>transactor_paypal</text:subject></text:span><text:span text:style-name="MT2"><text:tab/></text:span><text:span text:style-name="MT1"><text:chapter text:display="number" text:outline-level="2"/></text:span><text:span text:style-name="MT1"> </text:span><text:span text:style-name="MT1"><text:chapter text:display="name" text:outline-level="2">Changelog</text:chapter></text:span></text:p>
      </style:header>
      <style:footer>
        <text:p text:style-name="MP3"><text:page-number text:select-page="current">15</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EXT: PayPal Transactions</dc:title>
    <dc:subject>transactor_paypal</dc:subject>
    <meta:initial-creator>Kasper Skårhøj</meta:initial-creator>
    <meta:creation-date>2002-11-01T00:32:00</meta:creation-date>
    <dc:date>2026-03-13T11:13:56.114622522</dc:date>
    <meta:printed-by>Kasper Skårhøj</meta:printed-by>
    <meta:print-date>2002-12-11T11:38:18</meta:print-date>
    <meta:keyword>forAdmins</meta:keyword>
    <meta:keyword>forBeginners</meta:keyword>
    <meta:editing-cycles>235</meta:editing-cycles>
    <meta:editing-duration>P2DT12H12M45S</meta:editing-duration>
    <meta:document-statistic meta:table-count="0" meta:image-count="8" meta:object-count="0" meta:page-count="15" meta:paragraph-count="157" meta:word-count="1374" meta:character-count="9829" meta:non-whitespace-character-count="8321"/>
    <meta:user-defined meta:name="Author">Franz Holzinger</meta:user-defined>
    <meta:user-defined meta:name="Email">franz@ttproducts.de</meta:user-defined>
    <meta:user-defined meta:name="Info 4"/>
    <meta:user-defined meta:name="language (en, de, fr, nl, dk, es, ... )">en</meta:user-defined>
  </office:meta>
</office:document-meta>
</file>